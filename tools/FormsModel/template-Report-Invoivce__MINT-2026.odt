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Ubuntu Sans" svg:font-family="'Ubuntu Sans'" style:font-family-generic="swiss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3.7479in"/>
    </style:style>
    <style:style style:name="Table1.C" style:family="table-column">
      <style:table-column-properties style:column-width="0.6451in"/>
    </style:style>
    <style:style style:name="Table1.D" style:family="table-column">
      <style:table-column-properties style:column-width="0.8153in"/>
    </style:style>
    <style:style style:name="Table1.E" style:family="table-column">
      <style:table-column-properties style:column-width="0.9792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0201in" fo:border="0.05pt solid #000000" style:writing-mode="page"/>
    </style:style>
    <style:style style:name="Table1.2" style:family="table-row">
      <style:table-row-properties style:min-row-height="0.2597in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1" style:family="table-row">
      <style:table-row-properties style:min-row-height="0.2424in"/>
    </style:style>
    <style:style style:name="P1" style:family="paragraph" style:parent-style-name="Standard">
      <style:text-properties style:font-name="Ubuntu Sans"/>
    </style:style>
    <style:style style:name="P2" style:family="paragraph" style:parent-style-name="Standard">
      <style:text-properties style:font-name="Ubuntu Sans" officeooo:rsid="00180623" officeooo:paragraph-rsid="00180623"/>
    </style:style>
    <style:style style:name="P3" style:family="paragraph" style:parent-style-name="Standard">
      <style:text-properties style:font-name="Ubuntu Sans" fo:font-size="10pt" officeooo:rsid="00180623" officeooo:paragraph-rsid="00180623" style:font-size-asian="10pt" style:font-size-complex="10pt"/>
    </style:style>
    <style:style style:name="P4" style:family="paragraph" style:parent-style-name="Standard">
      <style:text-properties style:font-name="Ubuntu Sans" fo:font-size="9pt" officeooo:rsid="00180623" officeooo:paragraph-rsid="00180623" style:font-size-asian="9pt" style:font-size-complex="9pt"/>
    </style:style>
    <style:style style:name="P5" style:family="paragraph" style:parent-style-name="Table_20_Contents">
      <style:text-properties style:font-name="Ubuntu Sans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Ubuntu Sans" fo:font-size="9pt" fo:font-weight="bold" officeooo:rsid="00180623" officeooo:paragraph-rsid="00180623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Ubuntu Sans" fo:font-size="9pt" fo:font-weight="bold" officeooo:rsid="00180623" officeooo:paragraph-rsid="00180623" style:font-size-asian="9pt" style:font-weight-asian="bold" style:font-size-complex="9pt" style:font-weight-complex="bold"/>
    </style:style>
    <style:style style:name="P8" style:family="paragraph">
      <style:paragraph-properties fo:text-align="start"/>
      <style:text-properties style:text-line-through-style="none" style:text-line-through-type="none" fo:font-size="9pt" fo:font-style="normal" style:text-underline-style="none"/>
    </style:style>
    <style:style style:name="P9" style:family="paragraph">
      <style:paragraph-properties fo:text-align="end"/>
      <style:text-properties style:text-line-through-style="none" style:text-line-through-type="none" fo:font-style="normal" style:text-underline-style="none" fo:font-weight="bold"/>
    </style:style>
    <style:style style:name="P10" style:family="paragraph">
      <style:paragraph-properties fo:text-align="end"/>
      <style:text-properties style:text-line-through-style="none" style:text-line-through-type="none" fo:font-style="normal" style:text-underline-style="none"/>
    </style:style>
    <style:style style:name="P11" style:family="paragraph">
      <style:paragraph-properties fo:text-align="end"/>
      <style:text-properties style:text-line-through-style="none" style:text-line-through-type="none" fo:font-size="9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fo:font-size="9pt" fo:font-style="normal" style:text-underline-style="none"/>
    </style:style>
    <style:style style:name="P13" style:family="paragraph">
      <style:paragraph-properties fo:text-align="start"/>
      <style:text-properties fo:font-family="'Ubuntu Sans'" style:font-style-name="Condensed Regular" style:font-family-generic="swiss" fo:font-size="11pt"/>
    </style:style>
    <style:style style:name="P14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  <style:style style:name="P15" style:family="paragraph">
      <style:paragraph-properties fo:text-align="center"/>
      <style:text-properties style:text-line-through-style="none" style:text-line-through-type="none" fo:font-size="11pt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fo:font-family="'Ubuntu Sans'" style:font-style-name="Condensed Regular" style:font-family-generic="swiss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fo:font-family="'Ubuntu Sans'" style:font-style-name="Condensed Regular" style:font-family-generic="swiss" fo:font-size="12pt" fo:font-style="normal" style:text-underline-style="none"/>
    </style:style>
    <style:style style:name="P19" style:family="paragraph">
      <style:paragraph-properties fo:margin-left="0.0398in" fo:margin-right="0in" fo:text-indent="0in"/>
    </style:style>
    <style:style style:name="P20" style:family="paragraph">
      <loext:graphic-properties draw:fill="none" draw:fill-color="#ffffff"/>
      <style:paragraph-properties fo:margin-left="0.0398in" fo:margin-right="0in" fo:text-indent="0in"/>
      <style:text-properties style:font-name="Segoe UI" fo:font-size="7pt" style:font-size-asian="7pt" style:font-size-complex="7pt"/>
    </style:style>
    <style:style style:name="T1" style:family="text">
      <style:text-properties officeooo:rsid="0022a324"/>
    </style:style>
    <style:style style:name="T2" style:family="text">
      <style:text-properties officeooo:rsid="0043178f"/>
    </style:style>
    <style:style style:name="T3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T4" style:family="text">
      <style:text-properties style:font-name="Segoe UI" fo:font-size="7pt" style:font-size-asian="7pt" style:font-size-complex="7pt"/>
    </style:style>
    <style:style style:name="T5" style:family="text">
      <style:text-properties style:font-name="Segoe UI" fo:font-size="6pt" style:font-size-asian="6pt" style:font-size-complex="6pt"/>
    </style:style>
    <style:style style:name="T6" style:family="text">
      <style:text-properties style:font-name="Segoe UI" fo:font-size="7pt" fo:font-weight="bold" style:font-size-asian="7pt" style:font-weight-asian="bold" style:font-size-complex="7pt" style:font-weight-complex="bold"/>
    </style:style>
    <style:style style:name="gr1" style:family="graphic">
      <style:graphic-properties fo:border="none" loext:decorative="fals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loext:decorative="false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fo:border="solid" loext:decorative="false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vertical-align="top" fo:border="solid" loext:decorative="false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1.64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3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5" form:control-implementation="ooo:com.sun.star.form.component.TextField" xml:id="control5" form:id="control5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6" form:id="control6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7" form:id="control7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8" form:id="control8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10" form:id="control10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11" form:id="control11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Box_7" form:control-implementation="ooo:com.sun.star.form.component.TextField" xml:id="control12" form:id="control12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1" form:control-implementation="ooo:com.sun.star.form.component.ListBox" xml:id="control13" form:id="control1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"/>
            <form:option form:label="Report no.:" form:current-selected="true" form:selected="true"/>
            <form:option form:label="Invoice no.:"/>
            <form:option form:label="Receipt no,:"/>
          </form:listbox>
          <form:listbox form:name="List Box 1" form:control-implementation="ooo:com.sun.star.form.component.ListBox" xml:id="control14" form:id="control14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"/>
            <form:option form:label="Report " form:current-selected="true" form:selected="true"/>
            <form:option form:label="Invoice "/>
            <form:option form:label="Receipt "/>
          </form:listbox>
          <form:fixed-text form:name="Label Field 1" form:control-implementation="ooo:com.sun.star.form.component.FixedText" xml:id="control15" form:id="control15" form:label="Date: "/>
          <form:text form:name="Text Box 7" form:control-implementation="ooo:com.sun.star.form.component.TextField" xml:id="control16" form:id="control16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17" form:id="control17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18" form:id="control18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19" form:id="control19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20" form:id="control20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21" form:id="control21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22" form:id="control22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23" form:id="control23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24" form:id="control24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25" form:id="control25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26" form:id="control26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27" form:id="control27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28" form:id="control28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29" form:id="control29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30" form:id="control30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31" form:id="control31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32" form:id="control32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33" form:id="control33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34" form:id="control34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35" form:id="control35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36" form:id="control36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37" form:id="control37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38" form:id="control38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39" form:id="control39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Box_7a" form:control-implementation="ooo:com.sun.star.form.component.TextField" xml:id="control40" form:id="control40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Box_7b" form:control-implementation="ooo:com.sun.star.form.component.TextField" xml:id="control41" form:id="control41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Box_7c" form:control-implementation="ooo:com.sun.star.form.component.TextField" xml:id="control42" form:id="control42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Box_7d" form:control-implementation="ooo:com.sun.star.form.component.TextField" xml:id="control43" form:id="control43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Box_7e" form:control-implementation="ooo:com.sun.star.form.component.TextField" xml:id="control44" form:id="control44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Box_7f" form:control-implementation="ooo:com.sun.star.form.component.TextField" xml:id="control45" form:id="control45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Box_7g" form:control-implementation="ooo:com.sun.star.form.component.TextField" xml:id="control46" form:id="control46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Box_7h" form:control-implementation="ooo:com.sun.star.form.component.TextField" xml:id="control47" form:id="control47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48" form:id="control48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control text:anchor-type="paragraph" draw:z-index="13" draw:name="Control 55" draw:style-name="gr1" draw:text-style-name="P13" svg:width="1.0205in" svg:height="0.2961in" svg:x="0in" svg:y="0.1146in" draw:control="control13"/><draw:control text:anchor-type="paragraph" draw:z-index="5" draw:name="Control 5" draw:style-name="gr3" draw:text-style-name="P15" svg:width="1.1516in" svg:height="0.3787in" svg:x="1.05in" svg:y="0.0689in" draw:control="control5"/></text:p>
      <text:p text:style-name="P2"/>
      <text:p text:style-name="P2"><draw:control text:anchor-type="paragraph" draw:z-index="6" draw:name="Control 6" draw:style-name="gr1" draw:text-style-name="P14" svg:width="0.2803in" svg:height="0.2953in" svg:x="0.5799in" svg:y="0.15in" draw:control="control6"/><draw:control text:anchor-type="paragraph" draw:z-index="7" draw:name="Control 7" draw:style-name="gr1" draw:text-style-name="P14" svg:width="0.2803in" svg:height="0.2953in" svg:x="1.0201in" svg:y="0.15in" draw:control="control7"/><draw:control text:anchor-type="paragraph" draw:z-index="15" draw:name="Control 57" draw:style-name="gr2" draw:text-style-name="P13" svg:width="0.4925in" svg:height="0.3941in" svg:x="0in" svg:y="0.1201in" draw:control="control15"/></text:p>
      <text:p text:style-name="P2"><text:s text:c="24"/>/ <text:s text:c="9"/>/ 2026</text:p>
      <text:p text:style-name="P2"><draw:control text:anchor-type="paragraph" draw:z-index="14" draw:name="Control 56" draw:style-name="gr1" draw:text-style-name="P13" svg:width="1.0205in" svg:height="0.2961in" svg:x="0in" svg:y="0.15in" draw:control="control14"/></text:p>
      <text:p text:style-name="P2"><text:s text:c="28"/><text:span text:style-name="T1">for:</text:span></text:p>
      <text:p text:style-name="P2"><draw:control text:anchor-type="paragraph" draw:z-index="1" draw:name="Control 2" draw:style-name="gr4" draw:text-style-name="P17" svg:width="2.8394in" svg:height="1.0598in" svg:x="3.8201in" svg:y="0.1701in" draw:control="control1"/><draw:control text:anchor-type="paragraph" draw:z-index="2" draw:name="Control 1" draw:style-name="gr3" draw:text-style-name="P18" svg:width="3.6705in" svg:height="0.4823in" svg:x="0in" svg:y="0.1701in" draw:control="control2"/><text:s text:c="32"/></text:p>
      <text:p text:style-name="P2"/>
      <text:p text:style-name="P2"/>
      <text:p text:style-name="P2"/>
      <text:p text:style-name="P2"/>
      <text:p text:style-name="P2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s/n</text:p>
          </table:table-cell>
          <table:table-cell table:style-name="Table1.A1" office:value-type="string">
            <text:p text:style-name="P7">Description</text:p>
          </table:table-cell>
          <table:table-cell table:style-name="Table1.A1" office:value-type="string">
            <text:p text:style-name="P6">Quantity</text:p>
          </table:table-cell>
          <table:table-cell table:style-name="Table1.A1" office:value-type="string">
            <text:p text:style-name="P6">Unit price</text:p>
          </table:table-cell>
          <table:table-cell table:style-name="Table1.E1" office:value-type="string">
            <text:p text:style-name="P6">Total</text:p>
          </table:table-cell>
        </table:table-row>
        <table:table-row table:style-name="Table1.2">
          <table:table-cell table:style-name="Table1.A2" office:value-type="string">
            <text:p text:style-name="P5"><draw:control text:anchor-type="paragraph" draw:z-index="8" draw:name="Control 8" draw:style-name="gr1" draw:text-style-name="P11" svg:width="0.4504in" svg:height="0.2098in" svg:x="0in" svg:y="0in" draw:control="control8"/></text:p>
          </table:table-cell>
          <table:table-cell table:style-name="Table1.A2" office:value-type="string">
            <text:p text:style-name="P5"><draw:control text:anchor-type="paragraph" draw:z-index="9" draw:name="Control 17" draw:style-name="gr1" draw:text-style-name="P8" svg:width="3.7004in" svg:height="0.2098in" svg:x="0in" svg:y="0in" draw:control="control9"/></text:p>
          </table:table-cell>
          <table:table-cell table:style-name="Table1.A2" office:value-type="string">
            <text:p text:style-name="P5"><draw:control text:anchor-type="paragraph" draw:z-index="10" draw:name="Control 18" draw:style-name="gr1" draw:text-style-name="P12" svg:width="0.5303in" svg:height="0.2098in" svg:x="0.0402in" svg:y="0in" draw:control="control10"/></text:p>
          </table:table-cell>
          <table:table-cell table:style-name="Table1.A2" office:value-type="string">
            <text:p text:style-name="P5"><draw:control text:anchor-type="paragraph" draw:z-index="11" draw:name="Control 19" draw:style-name="gr1" draw:text-style-name="P11" svg:width="0.7705in" svg:height="0.2098in" svg:x="0in" svg:y="0in" draw:control="control11"/></text:p>
          </table:table-cell>
          <table:table-cell table:style-name="Table1.E2" office:value-type="string">
            <text:p text:style-name="P5"><draw:control text:anchor-type="paragraph" draw:z-index="12" draw:name="Control 20" draw:style-name="gr1" draw:text-style-name="P10" svg:width="0.9406in" svg:height="0.2098in" svg:x="0in" svg:y="0in" draw:control="control12"/></text:p>
          </table:table-cell>
        </table:table-row>
        <table:table-row table:style-name="Table1.2">
          <table:table-cell table:style-name="Table1.A2" office:value-type="string">
            <text:p text:style-name="P5"><draw:control text:anchor-type="paragraph" draw:z-index="32" draw:name="Control 9" draw:style-name="gr1" draw:text-style-name="P11" svg:width="0.4504in" svg:height="0.2098in" svg:x="0in" svg:y="0in" draw:control="control32"/></text:p>
          </table:table-cell>
          <table:table-cell table:style-name="Table1.A2" office:value-type="string">
            <text:p text:style-name="P5"><draw:control text:anchor-type="paragraph" draw:z-index="49" draw:name="Control 21" draw:style-name="gr1" draw:text-style-name="P8" svg:width="3.7004in" svg:height="0.2098in" svg:x="0in" svg:y="0in" draw:control="control49"/></text:p>
          </table:table-cell>
          <table:table-cell table:style-name="Table1.A2" office:value-type="string">
            <text:p text:style-name="P5"><draw:control text:anchor-type="paragraph" draw:z-index="16" draw:name="Control 29" draw:style-name="gr1" draw:text-style-name="P12" svg:width="0.5303in" svg:height="0.2098in" svg:x="0.0402in" svg:y="0in" draw:control="control16"/></text:p>
          </table:table-cell>
          <table:table-cell table:style-name="Table1.A2" office:value-type="string">
            <text:p text:style-name="P5"><draw:control text:anchor-type="paragraph" draw:z-index="24" draw:name="Control 37" draw:style-name="gr1" draw:text-style-name="P11" svg:width="0.7705in" svg:height="0.2098in" svg:x="0in" svg:y="0in" draw:control="control24"/></text:p>
          </table:table-cell>
          <table:table-cell table:style-name="Table1.E2" office:value-type="string">
            <text:p text:style-name="P5"><draw:control text:anchor-type="paragraph" draw:z-index="40" draw:name="Control 45" draw:style-name="gr1" draw:text-style-name="P10" svg:width="0.9406in" svg:height="0.2098in" svg:x="0in" svg:y="0in" draw:control="control40"/></text:p>
          </table:table-cell>
        </table:table-row>
        <table:table-row table:style-name="Table1.2">
          <table:table-cell table:style-name="Table1.A2" office:value-type="string">
            <text:p text:style-name="P5"><draw:control text:anchor-type="paragraph" draw:z-index="33" draw:name="Control 10" draw:style-name="gr1" draw:text-style-name="P11" svg:width="0.4504in" svg:height="0.2098in" svg:x="0in" svg:y="0in" draw:control="control33"/></text:p>
          </table:table-cell>
          <table:table-cell table:style-name="Table1.A2" office:value-type="string">
            <text:p text:style-name="P5"><draw:control text:anchor-type="paragraph" draw:z-index="50" draw:name="Control 22" draw:style-name="gr1" draw:text-style-name="P8" svg:width="3.7004in" svg:height="0.2098in" svg:x="0in" svg:y="0in" draw:control="control50"/></text:p>
          </table:table-cell>
          <table:table-cell table:style-name="Table1.A2" office:value-type="string">
            <text:p text:style-name="P5"><draw:control text:anchor-type="paragraph" draw:z-index="17" draw:name="Control 30" draw:style-name="gr1" draw:text-style-name="P12" svg:width="0.5303in" svg:height="0.2098in" svg:x="0.0402in" svg:y="0in" draw:control="control17"/></text:p>
          </table:table-cell>
          <table:table-cell table:style-name="Table1.A2" office:value-type="string">
            <text:p text:style-name="P5"><draw:control text:anchor-type="paragraph" draw:z-index="25" draw:name="Control 38" draw:style-name="gr1" draw:text-style-name="P11" svg:width="0.7705in" svg:height="0.2098in" svg:x="0in" svg:y="0in" draw:control="control25"/></text:p>
          </table:table-cell>
          <table:table-cell table:style-name="Table1.E2" office:value-type="string">
            <text:p text:style-name="P5"><draw:control text:anchor-type="paragraph" draw:z-index="41" draw:name="Control 46" draw:style-name="gr1" draw:text-style-name="P10" svg:width="0.9406in" svg:height="0.2098in" svg:x="0in" svg:y="0in" draw:control="control41"/></text:p>
          </table:table-cell>
        </table:table-row>
        <table:table-row table:style-name="Table1.2">
          <table:table-cell table:style-name="Table1.A2" office:value-type="string">
            <text:p text:style-name="P5"><draw:control text:anchor-type="paragraph" draw:z-index="34" draw:name="Control 11" draw:style-name="gr1" draw:text-style-name="P11" svg:width="0.4504in" svg:height="0.2098in" svg:x="0in" svg:y="0in" draw:control="control34"/></text:p>
          </table:table-cell>
          <table:table-cell table:style-name="Table1.A2" office:value-type="string">
            <text:p text:style-name="P5"><draw:control text:anchor-type="paragraph" draw:z-index="51" draw:name="Control 23" draw:style-name="gr1" draw:text-style-name="P8" svg:width="3.7004in" svg:height="0.2098in" svg:x="0in" svg:y="0in" draw:control="control51"/></text:p>
          </table:table-cell>
          <table:table-cell table:style-name="Table1.A2" office:value-type="string">
            <text:p text:style-name="P5"><draw:control text:anchor-type="paragraph" draw:z-index="18" draw:name="Control 31" draw:style-name="gr1" draw:text-style-name="P12" svg:width="0.5303in" svg:height="0.2098in" svg:x="0.0402in" svg:y="0in" draw:control="control18"/></text:p>
          </table:table-cell>
          <table:table-cell table:style-name="Table1.A2" office:value-type="string">
            <text:p text:style-name="P5"><draw:control text:anchor-type="paragraph" draw:z-index="26" draw:name="Control 39" draw:style-name="gr1" draw:text-style-name="P11" svg:width="0.7705in" svg:height="0.2098in" svg:x="0in" svg:y="0in" draw:control="control26"/></text:p>
          </table:table-cell>
          <table:table-cell table:style-name="Table1.E2" office:value-type="string">
            <text:p text:style-name="P5"><draw:control text:anchor-type="paragraph" draw:z-index="42" draw:name="Control 47" draw:style-name="gr1" draw:text-style-name="P10" svg:width="0.9406in" svg:height="0.2098in" svg:x="0in" svg:y="0in" draw:control="control42"/></text:p>
          </table:table-cell>
        </table:table-row>
        <table:table-row table:style-name="Table1.2">
          <table:table-cell table:style-name="Table1.A2" office:value-type="string">
            <text:p text:style-name="P5"><draw:control text:anchor-type="paragraph" draw:z-index="35" draw:name="Control 12" draw:style-name="gr1" draw:text-style-name="P11" svg:width="0.4504in" svg:height="0.2098in" svg:x="0in" svg:y="0in" draw:control="control35"/></text:p>
          </table:table-cell>
          <table:table-cell table:style-name="Table1.A2" office:value-type="string">
            <text:p text:style-name="P5"><draw:control text:anchor-type="paragraph" draw:z-index="52" draw:name="Control 24" draw:style-name="gr1" draw:text-style-name="P8" svg:width="3.7004in" svg:height="0.2098in" svg:x="0in" svg:y="0in" draw:control="control52"/></text:p>
          </table:table-cell>
          <table:table-cell table:style-name="Table1.A2" office:value-type="string">
            <text:p text:style-name="P5"><draw:control text:anchor-type="paragraph" draw:z-index="19" draw:name="Control 32" draw:style-name="gr1" draw:text-style-name="P12" svg:width="0.5303in" svg:height="0.2098in" svg:x="0.0402in" svg:y="0in" draw:control="control19"/></text:p>
          </table:table-cell>
          <table:table-cell table:style-name="Table1.A2" office:value-type="string">
            <text:p text:style-name="P5"><draw:control text:anchor-type="paragraph" draw:z-index="27" draw:name="Control 40" draw:style-name="gr1" draw:text-style-name="P11" svg:width="0.7705in" svg:height="0.2098in" svg:x="0in" svg:y="0in" draw:control="control27"/></text:p>
          </table:table-cell>
          <table:table-cell table:style-name="Table1.E2" office:value-type="string">
            <text:p text:style-name="P5"><draw:control text:anchor-type="paragraph" draw:z-index="43" draw:name="Control 48" draw:style-name="gr1" draw:text-style-name="P10" svg:width="0.9406in" svg:height="0.2098in" svg:x="0in" svg:y="0in" draw:control="control43"/></text:p>
          </table:table-cell>
        </table:table-row>
        <table:table-row table:style-name="Table1.2">
          <table:table-cell table:style-name="Table1.A2" office:value-type="string">
            <text:p text:style-name="P5"><draw:control text:anchor-type="paragraph" draw:z-index="36" draw:name="Control 13" draw:style-name="gr1" draw:text-style-name="P11" svg:width="0.4504in" svg:height="0.2098in" svg:x="0in" svg:y="0in" draw:control="control36"/></text:p>
          </table:table-cell>
          <table:table-cell table:style-name="Table1.A2" office:value-type="string">
            <text:p text:style-name="P5"><draw:control text:anchor-type="paragraph" draw:z-index="53" draw:name="Control 25" draw:style-name="gr1" draw:text-style-name="P8" svg:width="3.7004in" svg:height="0.2098in" svg:x="0in" svg:y="0in" draw:control="control53"/></text:p>
          </table:table-cell>
          <table:table-cell table:style-name="Table1.A2" office:value-type="string">
            <text:p text:style-name="P5"><draw:control text:anchor-type="paragraph" draw:z-index="20" draw:name="Control 33" draw:style-name="gr1" draw:text-style-name="P12" svg:width="0.5303in" svg:height="0.2098in" svg:x="0.0402in" svg:y="0in" draw:control="control20"/></text:p>
          </table:table-cell>
          <table:table-cell table:style-name="Table1.A2" office:value-type="string">
            <text:p text:style-name="P5"><draw:control text:anchor-type="paragraph" draw:z-index="28" draw:name="Control 41" draw:style-name="gr1" draw:text-style-name="P11" svg:width="0.7705in" svg:height="0.2098in" svg:x="0in" svg:y="0in" draw:control="control28"/></text:p>
          </table:table-cell>
          <table:table-cell table:style-name="Table1.E2" office:value-type="string">
            <text:p text:style-name="P5"><draw:control text:anchor-type="paragraph" draw:z-index="44" draw:name="Control 49" draw:style-name="gr1" draw:text-style-name="P10" svg:width="0.9406in" svg:height="0.2098in" svg:x="0in" svg:y="0in" draw:control="control44"/></text:p>
          </table:table-cell>
        </table:table-row>
        <table:table-row table:style-name="Table1.2">
          <table:table-cell table:style-name="Table1.A2" office:value-type="string">
            <text:p text:style-name="P5"><draw:control text:anchor-type="paragraph" draw:z-index="37" draw:name="Control 14" draw:style-name="gr1" draw:text-style-name="P11" svg:width="0.4504in" svg:height="0.2098in" svg:x="0in" svg:y="0in" draw:control="control37"/></text:p>
          </table:table-cell>
          <table:table-cell table:style-name="Table1.A2" office:value-type="string">
            <text:p text:style-name="P5"><draw:control text:anchor-type="paragraph" draw:z-index="54" draw:name="Control 26" draw:style-name="gr1" draw:text-style-name="P8" svg:width="3.7004in" svg:height="0.2098in" svg:x="0in" svg:y="0in" draw:control="control54"/></text:p>
          </table:table-cell>
          <table:table-cell table:style-name="Table1.A2" office:value-type="string">
            <text:p text:style-name="P5"><draw:control text:anchor-type="paragraph" draw:z-index="21" draw:name="Control 34" draw:style-name="gr1" draw:text-style-name="P12" svg:width="0.5303in" svg:height="0.2098in" svg:x="0.0402in" svg:y="0in" draw:control="control21"/></text:p>
          </table:table-cell>
          <table:table-cell table:style-name="Table1.A2" office:value-type="string">
            <text:p text:style-name="P5"><draw:control text:anchor-type="paragraph" draw:z-index="29" draw:name="Control 42" draw:style-name="gr1" draw:text-style-name="P11" svg:width="0.7705in" svg:height="0.2098in" svg:x="0in" svg:y="0in" draw:control="control29"/></text:p>
          </table:table-cell>
          <table:table-cell table:style-name="Table1.E2" office:value-type="string">
            <text:p text:style-name="P5"><draw:control text:anchor-type="paragraph" draw:z-index="45" draw:name="Control 50" draw:style-name="gr1" draw:text-style-name="P10" svg:width="0.9406in" svg:height="0.2098in" svg:x="0in" svg:y="0in" draw:control="control45"/></text:p>
          </table:table-cell>
        </table:table-row>
        <table:table-row table:style-name="Table1.2">
          <table:table-cell table:style-name="Table1.A2" office:value-type="string">
            <text:p text:style-name="P5"><draw:control text:anchor-type="paragraph" draw:z-index="38" draw:name="Control 15" draw:style-name="gr1" draw:text-style-name="P11" svg:width="0.4504in" svg:height="0.2098in" svg:x="0in" svg:y="0in" draw:control="control38"/></text:p>
          </table:table-cell>
          <table:table-cell table:style-name="Table1.A2" office:value-type="string">
            <text:p text:style-name="P5"><draw:control text:anchor-type="paragraph" draw:z-index="55" draw:name="Control 27" draw:style-name="gr1" draw:text-style-name="P8" svg:width="3.7004in" svg:height="0.2098in" svg:x="0in" svg:y="0in" draw:control="control55"/></text:p>
          </table:table-cell>
          <table:table-cell table:style-name="Table1.A2" office:value-type="string">
            <text:p text:style-name="P5"><draw:control text:anchor-type="paragraph" draw:z-index="22" draw:name="Control 35" draw:style-name="gr1" draw:text-style-name="P12" svg:width="0.5303in" svg:height="0.2098in" svg:x="0.0402in" svg:y="0in" draw:control="control22"/></text:p>
          </table:table-cell>
          <table:table-cell table:style-name="Table1.A2" office:value-type="string">
            <text:p text:style-name="P5"><draw:control text:anchor-type="paragraph" draw:z-index="30" draw:name="Control 43" draw:style-name="gr1" draw:text-style-name="P11" svg:width="0.7705in" svg:height="0.2098in" svg:x="0in" svg:y="0in" draw:control="control30"/></text:p>
          </table:table-cell>
          <table:table-cell table:style-name="Table1.E2" office:value-type="string">
            <text:p text:style-name="P5"><draw:control text:anchor-type="paragraph" draw:z-index="46" draw:name="Control 51" draw:style-name="gr1" draw:text-style-name="P10" svg:width="0.9406in" svg:height="0.2098in" svg:x="0in" svg:y="0in" draw:control="control46"/></text:p>
          </table:table-cell>
        </table:table-row>
        <table:table-row table:style-name="Table1.2">
          <table:table-cell table:style-name="Table1.A2" office:value-type="string">
            <text:p text:style-name="P5"><draw:control text:anchor-type="paragraph" draw:z-index="39" draw:name="Control 16" draw:style-name="gr1" draw:text-style-name="P11" svg:width="0.4504in" svg:height="0.2098in" svg:x="0in" svg:y="0in" draw:control="control39"/></text:p>
          </table:table-cell>
          <table:table-cell table:style-name="Table1.A2" office:value-type="string">
            <text:p text:style-name="P5"><draw:control text:anchor-type="paragraph" draw:z-index="56" draw:name="Control 28" draw:style-name="gr1" draw:text-style-name="P8" svg:width="3.7004in" svg:height="0.2098in" svg:x="0in" svg:y="0in" draw:control="control56"/></text:p>
          </table:table-cell>
          <table:table-cell table:style-name="Table1.A2" office:value-type="string">
            <text:p text:style-name="P5"><draw:control text:anchor-type="paragraph" draw:z-index="23" draw:name="Control 36" draw:style-name="gr1" draw:text-style-name="P12" svg:width="0.5303in" svg:height="0.2098in" svg:x="0.0402in" svg:y="0in" draw:control="control23"/></text:p>
          </table:table-cell>
          <table:table-cell table:style-name="Table1.A2" office:value-type="string">
            <text:p text:style-name="P5"><draw:control text:anchor-type="paragraph" draw:z-index="31" draw:name="Control 44" draw:style-name="gr1" draw:text-style-name="P11" svg:width="0.7705in" svg:height="0.2098in" svg:x="0in" svg:y="0in" draw:control="control31"/></text:p>
          </table:table-cell>
          <table:table-cell table:style-name="Table1.E2" office:value-type="string">
            <text:p text:style-name="P5"><draw:control text:anchor-type="paragraph" draw:z-index="47" draw:name="Control 52" draw:style-name="gr1" draw:text-style-name="P10" svg:width="0.9406in" svg:height="0.2098in" svg:x="0in" svg:y="0in" draw:control="control47"/></text:p>
          </table:table-cell>
        </table:table-row>
        <table:table-row table:style-name="Table1.11">
          <table:table-cell table:style-name="Table1.A2" table:number-columns-spanned="4" office:value-type="string">
            <text:p text:style-name="P7"><text:s/>GRAND TOTAL</text:p>
          </table:table-cell>
          <table:covered-table-cell/>
          <table:covered-table-cell/>
          <table:covered-table-cell/>
          <table:table-cell table:style-name="Table1.E2" office:value-type="string">
            <text:p text:style-name="P5"><draw:control text:anchor-type="paragraph" draw:z-index="48" draw:name="Control 53" draw:style-name="gr1" draw:text-style-name="P9" svg:width="0.9406in" svg:height="0.2098in" svg:x="0in" svg:y="0in" draw:control="control48"/></text:p>
          </table:table-cell>
        </table:table-row>
      </table:table>
      <text:p text:style-name="P4"><draw:control text:anchor-type="paragraph" draw:z-index="3" draw:name="Control 3" draw:style-name="gr3" draw:text-style-name="P17" svg:width="4.1406in" svg:height="2.7098in" svg:x="0.0484in" svg:y="0.1in" draw:control="control3"/></text:p>
      <text:p text:style-name="P2"><draw:frame text:anchor-type="paragraph" draw:z-index="0" draw:name="Text Frame 1" draw:style-name="gr5" draw:text-style-name="P20" svg:width="2.4122in" svg:height="1.6441in" svg:x="4.2811in" svg:y="-0.0591in"><draw:text-box><text:p text:style-name="P19"><text:span text:style-name="T3">BANK DETAILS</text:span></text:p><text:p text:style-name="P19"><text:span text:style-name="T4">Tanzanian Shillings deposit/transfer:</text:span></text:p><text:p text:style-name="P19"><text:span text:style-name="T5"/></text:p><text:p text:style-name="P19"><text:span text:style-name="T4">Name: <text:s text:c="10"/></text:span><text:span text:style-name="T6">DR TANYA DENTAL CLINIC LIMITED</text:span></text:p><text:p text:style-name="P19"><text:span text:style-name="T4">Account </text:span></text:p><text:p text:style-name="P19"><text:span text:style-name="T4">no. (TZS): <text:s text:c="6"/></text:span><text:span text:style-name="T6">10023005277</text:span></text:p><text:p text:style-name="P19"><text:span text:style-name="T4">Beneficiary </text:span></text:p><text:p text:style-name="P19"><text:span text:style-name="T4">bank: <text:s text:c="12"/></text:span><text:span text:style-name="T6">C.R.D.B. BANK PLC</text:span></text:p><text:p text:style-name="P19"><text:span text:style-name="T4"><text:s text:c="23"/></text:span><text:span text:style-name="T4">P.O.Box 268 </text:span></text:p><text:p text:style-name="P19"><text:span text:style-name="T4"><text:s text:c="23"/></text:span><text:span text:style-name="T4">Ali Hassan Mwinyi Road</text:span></text:p><text:p text:style-name="P19"><text:span text:style-name="T4"><text:s text:c="23"/></text:span><text:span text:style-name="T4">Dar es Salaam, Tanzania </text:span></text:p><text:p text:style-name="P19"><text:span text:style-name="T4"><text:s text:c="23"/></text:span><text:span text:style-name="T4">CRDB Bank Swift: </text:span><text:span text:style-name="T6">CORUTZTZ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ontrol text:anchor-type="paragraph" draw:z-index="4" draw:name="Control 4" draw:style-name="gr3" draw:text-style-name="P16" svg:width="2.4205in" svg:height="0.9551in" svg:x="4.2799in" svg:y="0.1138in" draw:control="control4"/></text:p>
      <text:p text:style-name="P2"/>
      <text:p text:style-name="P2"/>
      <text:p text:style-name="P2"/>
      <text:p text:style-name="P2"/>
      <text:p text:style-name="P2"/>
      <text:p text:style-name="P3"><text:s/>Signature:</text:p>
      <text:p text:style-name="P3"><text:s/></text:p>
      <text:p text:style-name="P3"><text:s/>Dr. Martina Trajkovska</text:p>
      <text:p text:style-name="P3"><text:s/>DD<text:span text:style-name="T2">S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Ubuntu Sans" svg:font-family="'Ubuntu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10:49:56.305190500</meta:creation-date>
    <dc:date>2026-02-27T15:24:19.411363696</dc:date>
    <meta:editing-duration>PT4H9M25S</meta:editing-duration>
    <meta:editing-cycles>38</meta:editing-cycles>
    <meta:generator>LibreOffice/24.2.7.2$Linux_X86_64 LibreOffice_project/420$Build-2</meta:generator>
    <meta:print-date>2026-02-27T15:24:27.415824203</meta:print-date>
    <meta:printed-by>PDF files</meta:printed-by>
    <meta:document-statistic meta:table-count="1" meta:image-count="0" meta:object-count="0" meta:page-count="1" meta:paragraph-count="13" meta:word-count="17" meta:character-count="193" meta:non-whitespace-character-count="89"/>
  </office:meta>
</office:document-meta>
</file>